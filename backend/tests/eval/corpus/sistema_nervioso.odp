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xmlns:svg="urn:oasis:names:tc:opendocument:xmlns:svg-compati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xmlns:svg="urn:oasis:names:tc:opendocument:xmlns:svg-compatible:1.0" office:version="1.2">
  <office:automatic-styles/>
  <office:body>
    <office:presentation>
      <draw:page draw:master-page-name="MP1">
        <draw:frame svg:width="24cm" svg:height="3cm" svg:x="2cm" svg:y="0.5cm">
          <draw:text-box>
            <text:p>El Sistema Nervioso</text:p>
          </draw:text-box>
        </draw:frame>
        <draw:frame svg:width="24cm" svg:height="15cm" svg:x="2cm" svg:y="4cm">
          <draw:text-box>
            <text:p>El sistema nervioso es el conjunto de estructuras que reciben, procesan y transmiten señales entre diferentes partes del cuerpo y entre el cuerpo y el entorno.</text:p>
          </draw:text-box>
        </draw:frame>
      </draw:page>
      <draw:page draw:master-page-name="MP1">
        <draw:frame svg:width="24cm" svg:height="3cm" svg:x="2cm" svg:y="0.5cm">
          <draw:text-box>
            <text:p>División anatómica</text:p>
          </draw:text-box>
        </draw:frame>
        <draw:frame svg:width="24cm" svg:height="15cm" svg:x="2cm" svg:y="4cm">
          <draw:text-box>
            <text:p>Sistema nervioso central (SNC): encéfalo y médula espinal.</text:p>
            <text:p>Sistema nervioso periférico (SNP): nervios craneales y espinales.</text:p>
            <text:p>El SNP se subdivide en somático (voluntario) y autónomo (involuntario).</text:p>
          </draw:text-box>
        </draw:frame>
      </draw:page>
      <draw:page draw:master-page-name="MP1">
        <draw:frame svg:width="24cm" svg:height="3cm" svg:x="2cm" svg:y="0.5cm">
          <draw:text-box>
            <text:p>La neurona</text:p>
          </draw:text-box>
        </draw:frame>
        <draw:frame svg:width="24cm" svg:height="15cm" svg:x="2cm" svg:y="4cm">
          <draw:text-box>
            <text:p>Unidad funcional del sistema nervioso.</text:p>
            <text:p>Partes: cuerpo celular (soma), dendritas y axón.</text:p>
            <text:p>Las neuronas se comunican mediante sinapsis.</text:p>
            <text:p>El cerebro humano contiene ~86 000 millones de neuronas.</text:p>
          </draw:text-box>
        </draw:frame>
      </draw:page>
      <draw:page draw:master-page-name="MP1">
        <draw:frame svg:width="24cm" svg:height="3cm" svg:x="2cm" svg:y="0.5cm">
          <draw:text-box>
            <text:p>El encéfalo</text:p>
          </draw:text-box>
        </draw:frame>
        <draw:frame svg:width="24cm" svg:height="15cm" svg:x="2cm" svg:y="4cm">
          <draw:text-box>
            <text:p>Cerebro: pensamiento, memoria, lenguaje, movimiento voluntario.</text:p>
            <text:p>Cerebelo: coordinación motora y equilibrio.</text:p>
            <text:p>Tronco del encéfalo: funciones vitales (respiración, ritmo cardíaco).</text:p>
            <text:p>Tálamo: relay sensorial hacia la corteza cerebral.</text:p>
          </draw:text-box>
        </draw:frame>
      </draw:page>
      <draw:page draw:master-page-name="MP1">
        <draw:frame svg:width="24cm" svg:height="3cm" svg:x="2cm" svg:y="0.5cm">
          <draw:text-box>
            <text:p>Sistema nervioso autónomo</text:p>
          </draw:text-box>
        </draw:frame>
        <draw:frame svg:width="24cm" svg:height="15cm" svg:x="2cm" svg:y="4cm">
          <draw:text-box>
            <text:p>Simpático: respuesta de lucha o huida (aumenta ritmo cardíaco, dilata pupilas).</text:p>
            <text:p>Parasimpático: descanso y digestión (reduce ritmo cardíaco, contrae pupilas).</text:p>
            <text:p>Los dos sistemas actúan de forma complementaria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xmlns:svg="urn:oasis:names:tc:opendocument:xmlns:svg-compatible:1.0" office:version="1.2">
  <office:styles/>
  <office:automatic-styles>
    <style:page-layout style:name="PL1">
      <style:page-layout-properties fo:page-width="28cm" fo:page-height="21cm" style:print-orientation="landscape" fo:margin="0cm"/>
    </style:page-layout>
  </office:automatic-styles>
  <office:master-styles>
    <style:master-page style:name="MP1" style:page-layout-name="PL1" style:display-name="MP1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xmlns:svg="urn:oasis:names:tc:opendocument:xmlns:svg-compatible:1.0" office:version="1.2">
  <office:meta>
    <meta:generator>ODFPY/1.4.1</meta:generator>
  </office:meta>
</office:document-meta>
</file>