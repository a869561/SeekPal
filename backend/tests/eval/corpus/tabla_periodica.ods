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spreadsheet>
      <table:table table:name="Tabla Periódica (fragmento)">
        <table:table-row>
          <table:table-cell>
            <text:p>Número atómico</text:p>
          </table:table-cell>
          <table:table-cell>
            <text:p>Nombre</text:p>
          </table:table-cell>
          <table:table-cell>
            <text:p>Símbolo</text:p>
          </table:table-cell>
          <table:table-cell>
            <text:p>Masa atómica (u)</text:p>
          </table:table-cell>
          <table:table-cell>
            <text:p>Grupo</text:p>
          </table:table-cell>
          <table:table-cell>
            <text:p>Período</text:p>
          </table:table-cell>
        </table:table-row>
        <table:table-row>
          <table:table-cell>
            <text:p>1</text:p>
          </table:table-cell>
          <table:table-cell>
            <text:p>Hidrógeno</text:p>
          </table:table-cell>
          <table:table-cell>
            <text:p>H</text:p>
          </table:table-cell>
          <table:table-cell>
            <text:p>1,008</text:p>
          </table:table-cell>
          <table:table-cell>
            <text:p>1</text:p>
          </table:table-cell>
          <table:table-cell>
            <text:p>1</text:p>
          </table:table-cell>
        </table:table-row>
        <table:table-row>
          <table:table-cell>
            <text:p>2</text:p>
          </table:table-cell>
          <table:table-cell>
            <text:p>Helio</text:p>
          </table:table-cell>
          <table:table-cell>
            <text:p>He</text:p>
          </table:table-cell>
          <table:table-cell>
            <text:p>4,003</text:p>
          </table:table-cell>
          <table:table-cell>
            <text:p>18</text:p>
          </table:table-cell>
          <table:table-cell>
            <text:p>1</text:p>
          </table:table-cell>
        </table:table-row>
        <table:table-row>
          <table:table-cell>
            <text:p>3</text:p>
          </table:table-cell>
          <table:table-cell>
            <text:p>Litio</text:p>
          </table:table-cell>
          <table:table-cell>
            <text:p>Li</text:p>
          </table:table-cell>
          <table:table-cell>
            <text:p>6,941</text:p>
          </table:table-cell>
          <table:table-cell>
            <text:p>1</text:p>
          </table:table-cell>
          <table:table-cell>
            <text:p>2</text:p>
          </table:table-cell>
        </table:table-row>
        <table:table-row>
          <table:table-cell>
            <text:p>6</text:p>
          </table:table-cell>
          <table:table-cell>
            <text:p>Carbono</text:p>
          </table:table-cell>
          <table:table-cell>
            <text:p>C</text:p>
          </table:table-cell>
          <table:table-cell>
            <text:p>12,011</text:p>
          </table:table-cell>
          <table:table-cell>
            <text:p>14</text:p>
          </table:table-cell>
          <table:table-cell>
            <text:p>2</text:p>
          </table:table-cell>
        </table:table-row>
        <table:table-row>
          <table:table-cell>
            <text:p>7</text:p>
          </table:table-cell>
          <table:table-cell>
            <text:p>Nitrógeno</text:p>
          </table:table-cell>
          <table:table-cell>
            <text:p>N</text:p>
          </table:table-cell>
          <table:table-cell>
            <text:p>14,007</text:p>
          </table:table-cell>
          <table:table-cell>
            <text:p>15</text:p>
          </table:table-cell>
          <table:table-cell>
            <text:p>2</text:p>
          </table:table-cell>
        </table:table-row>
        <table:table-row>
          <table:table-cell>
            <text:p>8</text:p>
          </table:table-cell>
          <table:table-cell>
            <text:p>Oxígeno</text:p>
          </table:table-cell>
          <table:table-cell>
            <text:p>O</text:p>
          </table:table-cell>
          <table:table-cell>
            <text:p>15,999</text:p>
          </table:table-cell>
          <table:table-cell>
            <text:p>16</text:p>
          </table:table-cell>
          <table:table-cell>
            <text:p>2</text:p>
          </table:table-cell>
        </table:table-row>
        <table:table-row>
          <table:table-cell>
            <text:p>11</text:p>
          </table:table-cell>
          <table:table-cell>
            <text:p>Sodio</text:p>
          </table:table-cell>
          <table:table-cell>
            <text:p>Na</text:p>
          </table:table-cell>
          <table:table-cell>
            <text:p>22,990</text:p>
          </table:table-cell>
          <table:table-cell>
            <text:p>1</text:p>
          </table:table-cell>
          <table:table-cell>
            <text:p>3</text:p>
          </table:table-cell>
        </table:table-row>
        <table:table-row>
          <table:table-cell>
            <text:p>12</text:p>
          </table:table-cell>
          <table:table-cell>
            <text:p>Magnesio</text:p>
          </table:table-cell>
          <table:table-cell>
            <text:p>Mg</text:p>
          </table:table-cell>
          <table:table-cell>
            <text:p>24,305</text:p>
          </table:table-cell>
          <table:table-cell>
            <text:p>2</text:p>
          </table:table-cell>
          <table:table-cell>
            <text:p>3</text:p>
          </table:table-cell>
        </table:table-row>
        <table:table-row>
          <table:table-cell>
            <text:p>13</text:p>
          </table:table-cell>
          <table:table-cell>
            <text:p>Aluminio</text:p>
          </table:table-cell>
          <table:table-cell>
            <text:p>Al</text:p>
          </table:table-cell>
          <table:table-cell>
            <text:p>26,982</text:p>
          </table:table-cell>
          <table:table-cell>
            <text:p>13</text:p>
          </table:table-cell>
          <table:table-cell>
            <text:p>3</text:p>
          </table:table-cell>
        </table:table-row>
        <table:table-row>
          <table:table-cell>
            <text:p>14</text:p>
          </table:table-cell>
          <table:table-cell>
            <text:p>Silicio</text:p>
          </table:table-cell>
          <table:table-cell>
            <text:p>Si</text:p>
          </table:table-cell>
          <table:table-cell>
            <text:p>28,086</text:p>
          </table:table-cell>
          <table:table-cell>
            <text:p>14</text:p>
          </table:table-cell>
          <table:table-cell>
            <text:p>3</text:p>
          </table:table-cell>
        </table:table-row>
        <table:table-row>
          <table:table-cell>
            <text:p>26</text:p>
          </table:table-cell>
          <table:table-cell>
            <text:p>Hierro</text:p>
          </table:table-cell>
          <table:table-cell>
            <text:p>Fe</text:p>
          </table:table-cell>
          <table:table-cell>
            <text:p>55,845</text:p>
          </table:table-cell>
          <table:table-cell>
            <text:p>8</text:p>
          </table:table-cell>
          <table:table-cell>
            <text:p>4</text:p>
          </table:table-cell>
        </table:table-row>
        <table:table-row>
          <table:table-cell>
            <text:p>29</text:p>
          </table:table-cell>
          <table:table-cell>
            <text:p>Cobre</text:p>
          </table:table-cell>
          <table:table-cell>
            <text:p>Cu</text:p>
          </table:table-cell>
          <table:table-cell>
            <text:p>63,546</text:p>
          </table:table-cell>
          <table:table-cell>
            <text:p>11</text:p>
          </table:table-cell>
          <table:table-cell>
            <text:p>4</text:p>
          </table:table-cell>
        </table:table-row>
        <table:table-row>
          <table:table-cell>
            <text:p>47</text:p>
          </table:table-cell>
          <table:table-cell>
            <text:p>Plata</text:p>
          </table:table-cell>
          <table:table-cell>
            <text:p>Ag</text:p>
          </table:table-cell>
          <table:table-cell>
            <text:p>107,868</text:p>
          </table:table-cell>
          <table:table-cell>
            <text:p>11</text:p>
          </table:table-cell>
          <table:table-cell>
            <text:p>5</text:p>
          </table:table-cell>
        </table:table-row>
        <table:table-row>
          <table:table-cell>
            <text:p>79</text:p>
          </table:table-cell>
          <table:table-cell>
            <text:p>Oro</text:p>
          </table:table-cell>
          <table:table-cell>
            <text:p>Au</text:p>
          </table:table-cell>
          <table:table-cell>
            <text:p>196,967</text:p>
          </table:table-cell>
          <table:table-cell>
            <text:p>11</text:p>
          </table:table-cell>
          <table:table-cell>
            <text:p>6</text:p>
          </table:table-cell>
        </table:table-row>
        <table:table-row>
          <table:table-cell>
            <text:p>82</text:p>
          </table:table-cell>
          <table:table-cell>
            <text:p>Plomo</text:p>
          </table:table-cell>
          <table:table-cell>
            <text:p>Pb</text:p>
          </table:table-cell>
          <table:table-cell>
            <text:p>207,200</text:p>
          </table:table-cell>
          <table:table-cell>
            <text:p>14</text:p>
          </table:table-cell>
          <table:table-cell>
            <text:p>6</text:p>
          </table:table-cell>
        </table:table-row>
        <table:table-row>
          <table:table-cell>
            <text:p>92</text:p>
          </table:table-cell>
          <table:table-cell>
            <text:p>Uranio</text:p>
          </table:table-cell>
          <table:table-cell>
            <text:p>U</text:p>
          </table:table-cell>
          <table:table-cell>
            <text:p>238,029</text:p>
          </table:table-cell>
          <table:table-cell>
            <text:p>--</text:p>
          </table:table-cell>
          <table:table-cell>
            <text:p>7</text:p>
          </table:table-cell>
        </table:table-row>
      </table:table>
      <table:table table:name="Estados de la materia">
        <table:table-row>
          <table:table-cell>
            <text:p>Estado</text:p>
          </table:table-cell>
          <table:table-cell>
            <text:p>Forma</text:p>
          </table:table-cell>
          <table:table-cell>
            <text:p>Volumen</text:p>
          </table:table-cell>
          <table:table-cell>
            <text:p>Ejemplo</text:p>
          </table:table-cell>
        </table:table-row>
        <table:table-row>
          <table:table-cell>
            <text:p>Sólido</text:p>
          </table:table-cell>
          <table:table-cell>
            <text:p>Fija</text:p>
          </table:table-cell>
          <table:table-cell>
            <text:p>Fijo</text:p>
          </table:table-cell>
          <table:table-cell>
            <text:p>Hielo, hierro</text:p>
          </table:table-cell>
        </table:table-row>
        <table:table-row>
          <table:table-cell>
            <text:p>Líquido</text:p>
          </table:table-cell>
          <table:table-cell>
            <text:p>Variable</text:p>
          </table:table-cell>
          <table:table-cell>
            <text:p>Fijo</text:p>
          </table:table-cell>
          <table:table-cell>
            <text:p>Agua, mercurio</text:p>
          </table:table-cell>
        </table:table-row>
        <table:table-row>
          <table:table-cell>
            <text:p>Gas</text:p>
          </table:table-cell>
          <table:table-cell>
            <text:p>Variable</text:p>
          </table:table-cell>
          <table:table-cell>
            <text:p>Variable</text:p>
          </table:table-cell>
          <table:table-cell>
            <text:p>Aire, vapor de agua</text:p>
          </table:table-cell>
        </table:table-row>
        <table:table-row>
          <table:table-cell>
            <text:p>Plasma</text:p>
          </table:table-cell>
          <table:table-cell>
            <text:p>Variable</text:p>
          </table:table-cell>
          <table:table-cell>
            <text:p>Variable</text:p>
          </table:table-cell>
          <table:table-cell>
            <text:p>Sol, relámpag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