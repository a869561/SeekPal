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Biología Celular</text:h>
      <text:p>La biología celular es la rama de la biología que estudia la célula como unidad fundamental de la vida. Toda célula procede de otra célula preexistente, según el principio formulado por Rudolf Virchow en 1855.</text:p>
      <text:h text:outline-level="2">Tipos de células</text:h>
      <text:p>Células procariotas: sin núcleo definido. Incluyen bacterias y arqueas. Son las formas de vida más antiguas, con unos 3500 millones de años de antigüedad.</text:p>
      <text:p>Células eucariotas: con núcleo rodeado de membrana nuclear. Forman todos los organismos multicelulares: plantas, animales, hongos y protistas.</text:p>
      <text:h text:outline-level="2">El ADN</text:h>
      <text:p>El ácido desoxirribonucleico (ADN) es la molécula que almacena la información genética. Se organiza en cromosomas dentro del núcleo celular. El genoma humano contiene aproximadamente 3000 millones de pares de bases y unos 20 000 genes codificantes.</text:p>
      <text:h text:outline-level="2">La mitosis</text:h>
      <text:p>La mitosis es el proceso de división celular en células eucariotas que produce dos células hijas con el mismo número de cromosomas que la célula madre. Consta de cuatro fases: profase, metafase, anafase y telofase, seguidas de la citocinesis.</text:p>
      <text:h text:outline-level="2">Organelas principales</text:h>
      <text:p>Mitocondria: produce energía en forma de ATP mediante la respiración celular. Ribosomas: sintetizan proteínas. Retículo endoplasmático: transporte y modificación de proteínas y lípidos. Aparato de Golgi: empaqueta y distribuye proteínas. Lisosomas: digestión intracelular mediante enzimas hidrolíticas.</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